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99aae" officeooo:paragraph-rsid="00199aae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9aae" officeooo:paragraph-rsid="00199aae"/>
    </style:style>
    <style:style style:name="P3" style:family="paragraph" style:parent-style-name="Standard">
      <style:text-properties fo:font-style="italic" style:text-underline-style="none" fo:font-weight="bold" officeooo:rsid="0018791e" officeooo:paragraph-rsid="00181ba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81bab" officeooo:paragraph-rsid="00181bab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officeooo:rsid="0013afbf" officeooo:paragraph-rsid="0013afbf"/>
    </style:style>
    <style:style style:name="P6" style:family="paragraph" style:parent-style-name="Standard">
      <style:text-properties officeooo:rsid="0013afbf" officeooo:paragraph-rsid="0013afbf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8791e" officeooo:paragraph-rsid="0018791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13afbf" officeooo:paragraph-rsid="0013afbf" style:font-style-asian="italic" style:font-weight-asian="bold" style:font-style-complex="italic" style:font-weight-complex="bold"/>
    </style:style>
    <style:style style:name="P9" style:family="paragraph" style:parent-style-name="Standard" style:list-style-name="L2">
      <style:text-properties officeooo:rsid="0013afbf" officeooo:paragraph-rsid="0013afbf"/>
    </style:style>
    <style:style style:name="P10" style:family="paragraph" style:parent-style-name="Standard">
      <style:text-properties fo:font-style="italic" fo:font-weight="bold" officeooo:rsid="00145c43" officeooo:paragraph-rsid="00145c43" style:font-style-asian="italic" style:font-weight-asian="bold" style:font-style-complex="italic" style:font-weight-complex="bold"/>
    </style:style>
    <style:style style:name="P11" style:family="paragraph" style:parent-style-name="Standard" style:list-style-name="L3">
      <style:text-properties officeooo:rsid="00145c43" officeooo:paragraph-rsid="00145c43"/>
    </style:style>
    <style:style style:name="P12" style:family="paragraph" style:parent-style-name="Standard">
      <style:text-properties officeooo:rsid="00145c43" officeooo:paragraph-rsid="00145c43"/>
    </style:style>
    <style:style style:name="P13" style:family="paragraph" style:parent-style-name="Standard">
      <style:text-properties fo:font-style="italic" fo:font-weight="bold" officeooo:rsid="0016320a" officeooo:paragraph-rsid="0016320a" style:font-style-asian="italic" style:font-weight-asian="bold" style:font-style-complex="italic" style:font-weight-complex="bold"/>
    </style:style>
    <style:style style:name="P14" style:family="paragraph" style:parent-style-name="Standard" style:list-style-name="L4">
      <style:text-properties officeooo:rsid="0016320a" officeooo:paragraph-rsid="0016320a"/>
    </style:style>
    <style:style style:name="P15" style:family="paragraph" style:parent-style-name="Standard">
      <style:text-properties officeooo:rsid="0016320a" officeooo:paragraph-rsid="0016320a"/>
    </style:style>
    <style:style style:name="P16" style:family="paragraph" style:parent-style-name="Standard">
      <style:text-properties fo:font-style="italic" fo:font-weight="bold" officeooo:rsid="0016320a" officeooo:paragraph-rsid="0018d47c" style:font-style-asian="italic" style:font-weight-asian="bold" style:font-style-complex="italic" style:font-weight-complex="bold"/>
    </style:style>
    <style:style style:name="P17" style:family="paragraph" style:parent-style-name="Standard" style:list-style-name="L5">
      <style:text-properties officeooo:rsid="0018ec01" officeooo:paragraph-rsid="0018ec01"/>
    </style:style>
    <style:style style:name="P18" style:family="paragraph" style:parent-style-name="Standard" style:list-style-name="L6">
      <style:text-properties officeooo:rsid="001742b5" officeooo:paragraph-rsid="001742b5"/>
    </style:style>
    <style:style style:name="T1" style:family="text">
      <style:text-properties style:text-underline-style="none" officeooo:rsid="0018791e"/>
    </style:style>
    <style:style style:name="T2" style:family="text">
      <style:text-properties officeooo:rsid="001b29d9"/>
    </style:style>
    <style:style style:name="T3" style:family="text">
      <style:text-properties style:text-underline-style="none"/>
    </style:style>
    <style:style style:name="T4" style:family="text">
      <style:text-properties officeooo:rsid="0018791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8d4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</text:p>
      <text:p text:style-name="P2">Uma corretora deseja criar um sistema para gerenciar Investidores, Ações e suas Negociações na bolsa de valores.</text:p>
      <text:p text:style-name="P3"/>
      <text:p text:style-name="P3"/>
      <text:p text:style-name="P4"><text:span text:style-name="T1">1 - </text:span>Entidades detectadas</text:p>
      <text:list text:style-name="L1">
        <text:list-item>
          <text:p text:style-name="P5">Investidor<text:span text:style-name="T2">es</text:span></text:p>
        </text:list-item>
        <text:list-item>
          <text:p text:style-name="P5">Açõ<text:span text:style-name="T2">es</text:span></text:p>
        </text:list-item>
        <text:list-item>
          <text:p text:style-name="P5">Negociações na bolsa de valores</text:p>
        </text:list-item>
        <text:list-item>
          <text:p text:style-name="P5">Empresa</text:p>
        </text:list-item>
        <text:list-item>
          <text:p text:style-name="P5">Histórico de Cotações das Ações</text:p>
        </text:list-item>
      </text:list>
      <text:p text:style-name="P6"/>
      <text:p text:style-name="P6"/>
      <text:p text:style-name="P7"><text:span text:style-name="T3">2 - </text:span>Detalhamento das entidades</text:p>
      <text:p text:style-name="P6"/>
      <text:p text:style-name="P8"><text:span text:style-name="T1">2.1 - </text:span>Investidor</text:p>
      <text:list text:style-name="L2">
        <text:list-item>
          <text:p text:style-name="P9">CPF/CNPJ</text:p>
        </text:list-item>
        <text:list-item>
          <text:p text:style-name="P9">Nome completo</text:p>
        </text:list-item>
        <text:list-item>
          <text:p text:style-name="P9">Tipo de investidor (pessoa física ou jurídica)</text:p>
        </text:list-item>
        <text:list-item>
          <text:p text:style-name="P9">Email</text:p>
        </text:list-item>
        <text:list-item>
          <text:p text:style-name="P9">Telefone</text:p>
        </text:list-item>
      </text:list>
      <text:p text:style-name="P6"/>
      <text:p text:style-name="P10"><text:span text:style-name="T4">2.2 - </text:span><text:span text:style-name="T5">Empresa</text:span></text:p>
      <text:list text:style-name="L3">
        <text:list-item>
          <text:p text:style-name="P11">Nome da empresa</text:p>
        </text:list-item>
        <text:list-item>
          <text:p text:style-name="P11">Setor de atuação</text:p>
        </text:list-item>
        <text:list-item>
          <text:p text:style-name="P11">Valor de mercado</text:p>
        </text:list-item>
      </text:list>
      <text:p text:style-name="P12"/>
      <text:p text:style-name="P13"><text:span text:style-name="T4">2.3 - </text:span><text:span text:style-name="T5">Negociações</text:span></text:p>
      <text:list text:style-name="L4">
        <text:list-item>
          <text:p text:style-name="P14">Tipo de negociação (compra ou venda)</text:p>
        </text:list-item>
        <text:list-item>
          <text:p text:style-name="P14">Data e hora da transação</text:p>
        </text:list-item>
        <text:list-item>
          <text:p text:style-name="P14">Quantidade de ações</text:p>
        </text:list-item>
        <text:list-item>
          <text:p text:style-name="P14">Valor unitário de cada ação</text:p>
        </text:list-item>
      </text:list>
      <text:p text:style-name="P15"/>
      <text:p text:style-name="P16"><text:span text:style-name="T4">2.4 - </text:span><text:span text:style-name="T5">Ações</text:span></text:p>
      <text:list text:style-name="L5">
        <text:list-item>
          <text:p text:style-name="P17">Ticker</text:p>
        </text:list-item>
      </text:list>
      <text:p text:style-name="P15"/>
      <text:p text:style-name="P13"><text:span text:style-name="T4">2.</text:span><text:span text:style-name="T6">5</text:span><text:span text:style-name="T4"> - </text:span><text:span text:style-name="T5">Histórico de Cotações das Ações</text:span></text:p>
      <text:list text:style-name="L6">
        <text:list-item>
          <text:p text:style-name="P18">Preço da ação</text:p>
        </text:list-item>
        <text:list-item>
          <text:p text:style-name="P18">Data, hora e valor da cotação</text:p>
        </text:list-item>
      </text:list>
      <text:p text:style-name="P15"/>
      <text:p text:style-name="P15"/>
      <text:p text:style-name="P15"/>
      <text:p text:style-name="P15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9:18:04.795691637</meta:creation-date>
    <dc:date>2026-04-12T00:06:12.879803576</dc:date>
    <meta:editing-duration>PT12H3M13S</meta:editing-duration>
    <meta:editing-cycles>6</meta:editing-cycles>
    <meta:generator>LibreOffice/25.8.6.2$Linux_X86_64 LibreOffice_project/a46b460d1686bb49c718d2ef5f88b83ff2dc4981</meta:generator>
    <meta:document-statistic meta:table-count="0" meta:image-count="0" meta:object-count="0" meta:page-count="1" meta:paragraph-count="29" meta:word-count="129" meta:character-count="655" meta:non-whitespace-character-count="575"/>
  </office:meta>
</office:document-meta>
</file>